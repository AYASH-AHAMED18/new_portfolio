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28in" fo:margin-bottom="0.028in" style:contextual-spacing="false"/>
    </style:style>
    <style:style style:name="P2" style:family="paragraph" style:parent-style-name="Standard">
      <style:paragraph-properties fo:margin-top="0in" fo:margin-bottom="0.028in" style:contextual-spacing="false" fo:text-align="center" style:justify-single-word="false"/>
    </style:style>
    <style:style style:name="P3" style:family="paragraph" style:parent-style-name="Standard">
      <style:paragraph-properties fo:margin-top="0.0417in" fo:margin-bottom="0in" style:contextual-spacing="false"/>
    </style:style>
    <style:style style:name="P4" style:family="paragraph" style:parent-style-name="Standard">
      <style:paragraph-properties fo:margin-top="0.0555in" fo:margin-bottom="0.028in" style:contextual-spacing="false"/>
    </style:style>
    <style:style style:name="P5" style:family="paragraph" style:parent-style-name="Standard">
      <style:paragraph-properties fo:margin-top="0.0693in" fo:margin-bottom="0.0138in" style:contextual-spacing="false"/>
    </style:style>
    <style:style style:name="P6" style:family="paragraph" style:parent-style-name="Standard">
      <style:paragraph-properties fo:margin-top="0in" fo:margin-bottom="0.0417in" style:contextual-spacing="false" fo:text-align="center" style:justify-single-word="false"/>
      <style:text-properties fo:color="#1a1a1a" loext:opacity="100%" style:font-name="Calibri" fo:font-size="26pt" fo:font-weight="bold" style:font-name-asian="Calibri1" style:font-size-asian="26pt" style:font-weight-asian="bold" style:font-name-complex="Calibri1" style:font-size-complex="26pt" style:font-weight-complex="bold"/>
    </style:style>
    <style:style style:name="P7" style:family="paragraph" style:parent-style-name="Standard">
      <style:paragraph-properties fo:margin-top="0.0555in" fo:margin-bottom="0.0555in" style:contextual-spacing="false"/>
      <style:text-properties fo:color="#1a1a1a" loext:opacity="100%" style:font-name="Calibri" fo:font-size="10pt" style:font-name-asian="Calibri1" style:font-size-asian="10pt" style:font-name-complex="Calibri1" style:font-size-complex="10pt"/>
    </style:style>
    <style:style style:name="P8" style:family="paragraph" style:parent-style-name="Standard">
      <style:paragraph-properties fo:margin-top="0.0555in" fo:margin-bottom="0.028in" style:contextual-spacing="false"/>
      <style:text-properties fo:color="#1a1a1a" loext:opacity="100%" style:font-name="Calibri" fo:font-size="10pt" style:font-name-asian="Calibri1" style:font-size-asian="10pt" style:font-name-complex="Calibri1" style:font-size-complex="10pt"/>
    </style:style>
    <style:style style:name="P9" style:family="paragraph" style:parent-style-name="Standard">
      <style:paragraph-properties fo:margin-top="0in" fo:margin-bottom="0.028in" style:contextual-spacing="false"/>
      <style:text-properties fo:color="#1a1a1a" loext:opacity="100%" style:font-name="Calibri" fo:font-size="10pt" style:font-name-asian="Calibri1" style:font-size-asian="10pt" style:font-name-complex="Calibri1" style:font-size-complex="10pt"/>
    </style:style>
    <style:style style:name="P10" style:family="paragraph" style:parent-style-name="Standard">
      <style:paragraph-properties fo:margin-top="0.0555in" fo:margin-bottom="0.0138in" style:contextual-spacing="false"/>
      <style:text-properties fo:color="#1a1a1a" loext:opacity="100%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P11" style:family="paragraph" style:parent-style-name="Standard">
      <style:paragraph-properties fo:margin-top="0.0417in" fo:margin-bottom="0.0138in" style:contextual-spacing="false"/>
      <style:text-properties fo:color="#1a1a1a" loext:opacity="100%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P12" style:family="paragraph" style:parent-style-name="Standard">
      <style:paragraph-properties fo:margin-top="0.0555in" fo:margin-bottom="0.0138in" style:contextual-spacing="false"/>
      <style:text-properties fo:color="#1a1a1a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margin-top="0in" fo:margin-bottom="0.0555in" style:contextual-spacing="false" fo:text-align="center" style:justify-single-word="false"/>
      <style:text-properties fo:color="#555555" loext:opacity="100%"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top="0in" fo:margin-bottom="0.028in" style:contextual-spacing="false"/>
      <style:text-properties fo:color="#555555" loext:opacity="100%" style:font-name="Calibri" fo:font-size="10pt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top="0in" fo:margin-bottom="0.0071in" style:contextual-spacing="false"/>
      <style:text-properties fo:color="#555555" loext:opacity="100%" style:font-name="Calibri" fo:font-size="9.5pt" style:font-name-asian="Calibri1" style:font-size-asian="9.5pt" style:font-name-complex="Calibri1" style:font-size-complex="9.5pt"/>
    </style:style>
    <style:style style:name="P16" style:family="paragraph" style:parent-style-name="Standard">
      <style:paragraph-properties fo:margin-top="0in" fo:margin-bottom="0.0417in" style:contextual-spacing="false"/>
      <style:text-properties fo:color="#555555" loext:opacity="100%" style:font-name="Calibri" fo:font-size="9.5pt" style:font-name-asian="Calibri1" style:font-size-asian="9.5pt" style:font-name-complex="Calibri1" style:font-size-complex="9.5pt"/>
    </style:style>
    <style:style style:name="P17" style:family="paragraph" style:parent-style-name="Standard">
      <style:paragraph-properties fo:margin-top="0in" fo:margin-bottom="0.028in" style:contextual-spacing="false"/>
      <style:text-properties fo:color="#555555" loext:opacity="100%" style:font-name="Calibri" fo:font-size="9.5pt" style:font-name-asian="Calibri1" style:font-size-asian="9.5pt" style:font-name-complex="Calibri1" style:font-size-complex="9.5pt"/>
    </style:style>
    <style:style style:name="P18" style:family="paragraph" style:parent-style-name="Standard">
      <style:paragraph-properties fo:margin-top="0.139in" fo:margin-bottom="0.0555in" style:contextual-spacing="false" fo:padding-left="0in" fo:padding-right="0in" fo:padding-top="0in" fo:padding-bottom="0.0555in" fo:border-left="none" fo:border-right="none" fo:border-top="none" fo:border-bottom="0.99pt solid #1a56a0"/>
      <style:text-properties fo:color="#1a56a0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9" style:family="paragraph" style:parent-style-name="List_20_Paragraph" style:list-style-name="WWNum2">
      <style:paragraph-properties fo:margin-top="0.028in" fo:margin-bottom="0.028in" style:contextual-spacing="false"/>
      <style:text-properties fo:color="#1a1a1a" loext:opacity="100%" style:font-name="Calibri" fo:font-size="10pt" style:font-name-asian="Calibri1" style:font-size-asian="10pt" style:font-name-complex="Calibri1" style:font-size-complex="10pt"/>
    </style:style>
    <style:style style:name="T1" style:family="text">
      <style:text-properties fo:color="#1a1a1a" loext:opacity="100%" style:font-name="Calibri" fo:font-size="10pt" style:font-name-asian="Calibri1" style:font-size-asian="10pt" style:font-name-complex="Calibri1" style:font-size-complex="10pt"/>
    </style:style>
    <style:style style:name="T2" style:family="text">
      <style:text-properties fo:color="#1a1a1a" loext:opacity="100%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3" style:family="text">
      <style:text-properties fo:color="#1a1a1a" loext:opacity="100%" style:font-name="Calibri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T4" style:family="text">
      <style:text-properties fo:color="#555555" loext:opacity="100%" style:font-name="Calibri" fo:font-size="9.5pt" style:font-name-asian="Calibri1" style:font-size-asian="9.5pt" style:font-name-complex="Calibri1" style:font-size-complex="9.5pt"/>
    </style:style>
    <style:style style:name="T5" style:family="text">
      <style:text-properties fo:color="#1a56a0" loext:opacity="100%" style:font-name="Calibri" fo:font-size="9.5pt" style:text-underline-style="solid" style:text-underline-width="auto" style:text-underline-color="font-color" style:font-name-asian="Calibri1" style:font-size-asian="9.5pt" style:font-name-complex="Calibri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YASH AHAMED</text:p>
      <text:p text:style-name="P13">Computer Science Undergraduate <text:s/>| <text:s/>Software Developer</text:p>
      <text:p text:style-name="P2"><text:span text:style-name="T4">139/Weerasole, Kapugollewa, Horrowpothana, Sri Lanka <text:s/>| <text:s/></text:span><text:a xlink:type="simple" xlink:href="https://www.linkedin.com/in/ayash-ahamed-5598a4318/" text:style-name="Standard" text:visited-style-name="Standard"><text:span text:style-name="T5">LinkedIn</text:span></text:a><text:span text:style-name="T4"> <text:s/>| <text:s/></text:span><text:a xlink:type="simple" xlink:href="https://github.com/AYASH-AHAMED18" text:style-name="Standard" text:visited-style-name="Standard"><text:span text:style-name="T5">GitHub</text:span></text:a><text:span text:style-name="T4"> <text:s/>| <text:s/></text:span><text:a xlink:type="simple" xlink:href="https://ayash-ahamed18.github.io/portfolio/" text:style-name="Standard" text:visited-style-name="Standard"><text:span text:style-name="T5">Portfolio</text:span></text:a></text:p>
      <text:p text:style-name="P3"/>
      <text:p text:style-name="P18">PROFESSIONAL SUMMARY</text:p>
      <text:p text:style-name="P7">Motivated and adaptable Computer Science undergraduate with hands-on experience in full-stack development, deep learning, and natural language processing. Passionate about building practical, impactful solutions using modern frameworks and tools. Demonstrated ability to design and deploy end-to-end applications leveraging machine learning models and cloud platforms.</text:p>
      <text:p text:style-name="P3"/>
      <text:p text:style-name="P18">TECHNICAL SKILLS</text:p>
      <text:p text:style-name="P4"><text:span text:style-name="T2">Programming Languages: <text:s/></text:span><text:span text:style-name="T1">Python, C++, Java, PHP, SQL, GNU Prolog</text:span></text:p>
      <text:p text:style-name="P1"><text:span text:style-name="T2">Frameworks &amp; Technologies: <text:s/></text:span><text:span text:style-name="T1">TensorFlow, PyTorch, React, Flask, HTML, CSS</text:span></text:p>
      <text:p text:style-name="P1"><text:span text:style-name="T2">Libraries &amp; Tools: <text:s/></text:span><text:span text:style-name="T1">NumPy, Pandas, OpenCV, NLTK, Hugging Face Transformers, Git, Docker</text:span></text:p>
      <text:p text:style-name="P1"><text:span text:style-name="T2">Design: <text:s/></text:span><text:span text:style-name="T1">Figma</text:span></text:p>
      <text:p text:style-name="P3"/>
      <text:p text:style-name="P18">EDUCATION</text:p>
      <text:p text:style-name="P12">BSc in Computer Science</text:p>
      <text:p text:style-name="P14">Trincomalee Campus, Eastern University, Sri Lanka <text:s/>| <text:s/>Trincomalee, Sri Lanka</text:p>
      <text:p text:style-name="P3"/>
      <text:p text:style-name="P18">PROJECTS</text:p>
      <text:p text:style-name="P5"><text:span text:style-name="T3">Offline Smart Printing Using QR Codes</text:span><text:span text:style-name="T4"> <text:s/>| <text:s/>Python, TensorFlow, OpenCV</text:span></text:p>
      <text:list xml:id="list4256750417" text:style-name="WWNum2">
        <text:list-item text:start-value="1">
          <text:p text:style-name="P19">Developed a full-stack application for printing shops to enable easy and efficient document transfer via QR codes.</text:p>
        </text:list-item>
        <text:list-item>
          <text:p text:style-name="P19">Implemented CNN and LSTM deep learning models for image feature extraction and caption generation.</text:p>
        </text:list-item>
        <text:list-item>
          <text:p text:style-name="P19">Achieved state-of-the-art performance benchmarked on the COCO dataset.</text:p>
        </text:list-item>
      </text:list>
      <text:p text:style-name="P5"><text:span text:style-name="T3">Budget Tracking System</text:span><text:span text:style-name="T4"> <text:s/>| <text:s/>Python, Flask, NLTK, Hugging Face</text:span></text:p>
      <text:list xml:id="list234241272687901" text:continue-numbering="true" text:style-name="WWNum2">
        <text:list-item>
          <text:p text:style-name="P19">Developed an expert system using GNU Prolog as a coursework project, integrating rule-based logic with NLP capabilities.</text:p>
        </text:list-item>
        <text:list-item>
          <text:p text:style-name="P19">Implemented pre-trained transformer models via Hugging Face for intelligent budget classification and analysis.</text:p>
        </text:list-item>
        <text:list-item>
          <text:p text:style-name="P19">Deployed the application as a REST API on a cloud platform for seamless integration.</text:p>
        </text:list-item>
      </text:list>
      <text:p text:style-name="P5"><text:span text:style-name="T3">QR Code Generator Web Application</text:span><text:span text:style-name="T4"> <text:s/>| <text:s/>Python, Flask, Hugging Face</text:span></text:p>
      <text:list xml:id="list234241609881519" text:continue-numbering="true" text:style-name="WWNum2">
        <text:list-item>
          <text:p text:style-name="P19">Built a web application to dynamically generate QR codes, providing a clean and user-friendly interface.</text:p>
        </text:list-item>
        <text:list-item>
          <text:p text:style-name="P19">Integrated Hugging Face pre-trained transformer models to enhance functionality.</text:p>
        </text:list-item>
        <text:list-item>
          <text:p text:style-name="P19">Deployed the API to a cloud platform enabling easy external integration.</text:p>
        </text:list-item>
      </text:list>
      <text:p text:style-name="P5"><text:span text:style-name="T3">Adaptive Vector-Based Collaboration for Low-Bandwidth Remote Learning</text:span><text:span text:style-name="T4"> <text:s/>| <text:s/>Python, Flask, NLP</text:span></text:p>
      <text:list xml:id="list234242951782322" text:continue-numbering="true" text:style-name="WWNum2">
        <text:list-item>
          <text:p text:style-name="P19">Designed and developed a remote learning platform optimized for low-bandwidth environments using vector-based collaboration techniques.</text:p>
        </text:list-item>
        <text:list-item>
          <text:p text:style-name="P19">Leveraged NLP and Hugging Face transformer models to enhance content delivery and interactivity.</text:p>
        </text:list-item>
        <text:list-item>
          <text:p text:style-name="P19">Deployed the solution on a cloud platform for scalable, real-world usage.</text:p>
        </text:list-item>
      </text:list>
      <text:p text:style-name="P5"><text:soft-page-break/><text:span text:style-name="T3">Master Kitchen — Online Food Ordering Application</text:span><text:span text:style-name="T4"> <text:s/>| <text:s/>React, Node.js, Express, MongoDB</text:span></text:p>
      <text:list xml:id="list234242120591945" text:continue-numbering="true" text:style-name="WWNum2">
        <text:list-item>
          <text:p text:style-name="P19">Built a production-ready full-stack food ordering web application with customer and admin portals using React 18 (TypeScript), Vite, and Tailwind CSS on the frontend.</text:p>
        </text:list-item>
        <text:list-item>
          <text:p text:style-name="P19">Developed a RESTful backend API with Node.js and Express, implementing JWT authentication, bcrypt password hashing, and role-based authorization middleware.</text:p>
        </text:list-item>
        <text:list-item>
          <text:p text:style-name="P19">Designed MongoDB schemas using Mongoose for users, food items, categories, and orders; implemented full CRUD operations with search, filtering, and sorting.</text:p>
        </text:list-item>
        <text:list-item>
          <text:p text:style-name="P19">Implemented end-to-end order management workflow including cart, checkout, order tracking, status updates, and cancellation features.</text:p>
        </text:list-item>
        <text:list-item>
          <text:p text:style-name="P19">Built an admin dashboard with statistics, user management, food/category management, and order status controls.</text:p>
        </text:list-item>
      </text:list>
      <text:p text:style-name="P3"/>
      <text:p text:style-name="P18">CERTIFICATIONS</text:p>
      <text:p text:style-name="P8">• <text:s/>Introduction to Python</text:p>
      <text:p text:style-name="P9">• <text:s/>Introduction to Figma</text:p>
      <text:p text:style-name="P3"/>
      <text:p text:style-name="P18">REFERENCES</text:p>
      <text:p text:style-name="P10">Ms. Thanushiya Thanujan</text:p>
      <text:p text:style-name="P15">Senior Lecturer &amp; Head, Department of Computer Science</text:p>
      <text:p text:style-name="P15">Faculty of Applied Science, Eastern University of Sri Lanka</text:p>
      <text:p text:style-name="P16">Phone: +94773449623 <text:s/>| <text:s/>Email: thanushyal@esn.ac.lk</text:p>
      <text:p text:style-name="P11">Ms. J. Janany</text:p>
      <text:p text:style-name="P15">Lecturer (Probationary), Department of Computer Science</text:p>
      <text:p text:style-name="P15">Faculty of Applied Science, Eastern University of Sri Lanka</text:p>
      <text:p text:style-name="P17">Phone: +94764589838 <text:s/>| <text:s/>Email: jananij@esn.ac.l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1a1a1a" loext:opacity="10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1a1a1a" loext:opacity="10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252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6252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6-24T14:27:02.944000000</meta:creation-date>
    <dc:date>2026-06-24T14:27:02.944000000</dc:date>
    <meta:generator>LibreOffice/7.3.7.2$Linux_X86_64 LibreOffice_project/30$Build-2</meta:generator>
    <meta:document-statistic meta:table-count="0" meta:image-count="0" meta:object-count="0" meta:page-count="2" meta:paragraph-count="48" meta:word-count="491" meta:character-count="3613" meta:non-whitespace-character-count="3156"/>
  </office:meta>
</office:document-meta>
</file>